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964" officeooo:paragraph-rsid="00198964"/>
    </style:style>
    <style:style style:name="P2" style:family="paragraph" style:parent-style-name="Standard">
      <style:text-properties officeooo:rsid="00198964" officeooo:paragraph-rsid="00198964"/>
    </style:style>
    <style:style style:name="T1" style:family="text">
      <style:text-properties officeooo:rsid="001b8c33"/>
    </style:style>
    <style:style style:name="T2" style:family="text">
      <style:text-properties officeooo:rsid="001b9563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officeooo:rsid="001d4d10" fo:background-color="#81d41a" loext:char-shading-value="0"/>
    </style:style>
    <style:style style:name="T6" style:family="text">
      <style:text-properties officeooo:rsid="001b8c33" fo:background-color="#81d41a" loext:char-shading-value="0"/>
    </style:style>
    <style:style style:name="T7" style:family="text">
      <style:text-properties officeooo:rsid="001b9563" fo:background-color="#81d41a" loext:char-shading-value="0"/>
    </style:style>
    <style:style style:name="T8" style:family="text">
      <style:text-properties officeooo:rsid="00200b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Ros command </text:span><text:line-break/><text:line-break/><text:span text:style-name="T4">#sourceing ros2 befor evry terminal use </text:span><text:line-break/></text:p>
      <text:p text:style-name="P1">source /opt/ros/jazzy/setup.bash <text:s text:c="2"/><text:line-break/><text:line-break/>#<text:span text:style-name="T4">making it permanent </text:span></text:p>
      <text:p text:style-name="P1"/>
      <text:p text:style-name="P1">echo "source /opt/ros/jazzy/setup.bash" &gt;&gt; ~/.bashrc</text:p>
      <text:p text:style-name="P1">source ~/.bashrc <text:s text:c="2"/></text:p>
      <text:p text:style-name="P1"/>
      <text:p text:style-name="P1"><text:span text:style-name="T4">% </text:span><text:span text:style-name="T5">R0S 2 empty files installation for cmake file </text:span><text:line-break/><text:line-break/>ros2 pkg create --build-type ament_cmake --license BSD-3-Clause my_robot_description <text:s text:c="2"/><text:line-break/><text:line-break/><text:span text:style-name="T6">final launch command for urdf </text:span><text:span text:style-name="T1"><text:line-break/><text:line-break/># 1. Step back to your workspace root directory</text:span></text:p>
      <text:p text:style-name="P1">cd /mnt/<text:span text:style-name="T8">sun</text:span>/robot</text:p>
      <text:p text:style-name="P1"/>
      <text:p text:style-name="P1"># 2. Source the local workspace so ROS learns where 'ro_description' lives</text:p>
      <text:p text:style-name="P1">source install/setup.bash</text:p>
      <text:p text:style-name="P1"/>
      <text:p text:style-name="P1"># 3. Launch using the un-hijackable full absolute path</text:p>
      <text:p text:style-name="P1"/>
      <text:p text:style-name="P1">ros2 launch urdf_tutorial display.launch.py model:=/mnt/<text:span text:style-name="T8">sun</text:span>/robot/src/ro/ro_description/urdf/robots/rosmaster_x3.urdf.xacro<text:line-break/><text:line-break/><text:span text:style-name="T7">final launch command for webots </text:span><text:span text:style-name="T2"><text:line-break/><text:line-break/>cd /mnt/d451ff05-e7cb-4380-9e5e-db29714d7df0/robot</text:span></text:p>
      <text:p text:style-name="P1"/>
      <text:p text:style-name="P1">colcon build --symlink-install</text:p>
      <text:p text:style-name="P1"/>
      <text:p text:style-name="P1">source install/setup.bash</text:p>
      <text:p text:style-name="P1"/>
      <text:p text:style-name="P1">ros2 launch ro_description sim.launch.py<text:line-break/><text:line-break/><text:line-break/>cd /mnt/sun/robot</text:p>
      <text:p text:style-name="P1">colcon build &amp;&amp; source install/setup.bash</text:p>
      <text:p text:style-name="P1">ros2 launch ro_description sim.launch.py<text:line-break/><text:line-break/>cd /mnt/sun/robot</text:p>
      <text:p text:style-name="P1">source install/setup.bash</text:p>
      <text:p text:style-name="P1">ros2 run teleop_twist_keyboard teleop_twist_keyboar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4T18:54:55.491495816</meta:creation-date>
    <dc:date>2026-05-18T17:25:37.163579350</dc:date>
    <meta:editing-duration>PT4H4M33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119" meta:character-count="1073" meta:non-whitespace-character-count="948"/>
  </office:meta>
</office:document-meta>
</file>